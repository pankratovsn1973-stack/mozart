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P1" style:family="paragraph" style:parent-style-name="Horizontal_20_Line">
      <style:paragraph-properties fo:text-align="start" style:justify-single-word="false" style:border-line-width-bottom="0.0016in 0.0016in 0.0016in" fo:padding="0in" fo:border-left="none" fo:border-right="none" fo:border-top="none" fo:border-bottom="0.31pt double #808080" style:writing-mode="lr-tb"/>
      <style:text-properties style:font-name="Liberation Seri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eadef"/>
    </style:style>
    <style:style style:name="P4" style:family="paragraph" style:parent-style-name="Standard">
      <style:paragraph-properties fo:text-align="start" style:justify-single-word="false"/>
      <style:text-properties style:font-name="Liberation Serif"/>
    </style:style>
    <style:style style:name="P5" style:family="paragraph" style:parent-style-name="Standard">
      <style:paragraph-properties fo:text-align="start" style:justify-single-word="false"/>
      <style:text-properties officeooo:rsid="000eadef" officeooo:paragraph-rsid="000eadef"/>
    </style:style>
    <style:style style:name="P6" style:family="paragraph" style:parent-style-name="Standard">
      <style:paragraph-properties fo:text-align="start" style:justify-single-word="false"/>
      <style:text-properties officeooo:rsid="000f9878" officeooo:paragraph-rsid="000f9878"/>
    </style:style>
    <style:style style:name="P7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</style:style>
    <style:style style:name="P8" style:family="paragraph" style:parent-style-name="Text_20_body">
      <style:paragraph-properties fo:line-height="115%" fo:text-align="start" style:justify-single-word="false" style:writing-mode="lr-tb"/>
    </style:style>
    <style:style style:name="P9" style:family="paragraph" style:parent-style-name="Text_20_body" style:list-style-name="WWNum3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0" style:family="paragraph" style:parent-style-name="Text_20_body" style:list-style-name="WWNum3">
      <style:paragraph-properties fo:margin-left="0.4925in" fo:margin-right="0in" fo:line-height="115%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" style:family="paragraph" style:parent-style-name="Text_20_body" style:list-style-name="WWNum3">
      <style:paragraph-properties fo:margin-left="0.9846in" fo:margin-right="0in" fo:margin-top="0in" fo:margin-bottom="0in" style:contextual-spacing="false" fo:line-height="115%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2" style:family="paragraph" style:parent-style-name="Text_20_body">
      <style:paragraph-properties fo:margin-left="0in" fo:margin-right="0in" fo:line-height="115%" fo:text-indent="0in" style:auto-text-indent="false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officeooo:rsid="000eadef"/>
    </style:style>
    <style:style style:name="T3" style:family="text">
      <style:text-properties officeooo:rsid="000f8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ническое описание системы</text:p>
      <text:p text:style-name="P2"/>
      <text:p text:style-name="P2">система предназначена для быстрой разработки трехзвенных решений erp уровня для малых средних и крупных предприятий</text:p>
      <text:p text:style-name="P2"/>
      <text:p text:style-name="P2">Концепция организации хранения данных</text:p>
      <text:p text:style-name="P2">Среда хранения — Postgres.</text:p>
      <text:p text:style-name="P2">Архитектура данных изначально нацелена на единообразное обращение с данными — создание, редактирование, удаление.</text:p>
      <text:p text:style-name="P2">Архитектура должна обспечивать создание «сущностей» на лету. Сущность — это по сути некий справочник в котором элементами являются данные разных классов. Первичный базовый класс сущностей — простой иерархический справочник с обеспечением хранения историзма — т. е. Версий элементов этого справочника.</text:p>
      <text:p text:style-name="P5"/>
      <text:p text:style-name="P5">Нотация- венгерская.</text:p>
      <text:p text:style-name="P5"/>
      <text:p text:style-name="P2">Ниже перечислены все классы сущностей системы- базовый и порожденные от базового класса сущностей — сущности справочник (указанное действует только в части хранения собственно данных, метаданные имеют отдельную структуру) :</text:p>
      <text:p text:style-name="P2">1) Справочник — простой иерархический (опционно) версионный (опционно, но если он не версионный — одна запись в таблице версий присутсвует в любом случае),</text:p>
      <text:p text:style-name="P2">2) Документы — справочник, элементы которого включают в себя строки из других справочников- тн подчиненные таблицы, из одного и того же справочника для одного элемента -документа может быть несколько наборов записей — подчиненных таблиц. Они отличаются в пределах одного типа документа ролями. При настройке починенности явно указывается роль подчиненной таблицы в Документе. У строк подчиненных таблиц в свою очередь могут быть свои подчиненные таблицы. Указание в конфигураторе для справочника/документа , что он подчиненный однозначно влечет невозможность отображения этих данных в отрыве от мастер таблицы. В конфигураторе для мастер -таблицы организуется хранение всех подчиненных таблиц(одна подчиненная таблица- одна запись в конфигураторе подчиненности)</text:p>
      <text:p text:style-name="P2">Кроме того, документы обладают тем свойством, что они передаются от пользователя к пользователю и от процесса к процессу. При передаче задается действие(алгоритм), задается срок обработки, задается задание, задается роль получателя- из справочника. Между исполнителями организуются доверенные отношения, когда пользователь либо доверяет другому работу вместо себя/вместе с собой с документом, либо когда пользователь делегирует(переназначает) обработку вместо себя — другому лицу (список довереннных и список подчиненных задается)</text:p>
      <text:p text:style-name="P2">3) Расчет/алгоритм — простой тип справочника, практически идентичный Справочнику. Хранит ссылки / адреса на диске используемых процедур.</text:p>
      <text:p text:style-name="P2">4) Действие/операция — перечень активностей пользователей/процессов в системе. Для действий задается набор проводок (если требуется)</text:p>
      <text:p text:style-name="P2">5) Счета — сущность, хранящая обьекты, требующие учета, подсчета, ответсвенного хранения… Например счет — здание котельной. Имеет по умолчанию указание дебетовый он или кредитный.</text:p>
      <text:p text:style-name="P2">6) Планы счетов бух учета — различные планы счетов. Все элементы сущностей счета привязываются к счетам бух.учета</text:p>
      <text:p text:style-name="P3">7) Ипостаси</text:p>
      <text:p text:style-name="P3"><text:span text:style-name="T2">этот тип сущности неразрывно связан со счетами</text:span> — это качественная составляющая хранимых количеств, <text:span text:style-name="T2">отражающих природу счета</text:span>. Например счет «Мониторы» <text:span text:style-name="T2">может иметь две</text:span> ипостаси — количество мониторов, стоимость мониторов. При этом стоимость <text:soft-page-break/>мониторов привязывается в плану счетов, а количество — нет<text:span text:style-name="T2">(а может и прязаться к какому нибудь забалансовому счету с количествами, при необходимости)</text:span></text:p>
      <text:p text:style-name="P2">8) Оргструктуры — справочники со структурами предприятий</text:p>
      <text:p text:style-name="P2"><text:s/></text:p>
      <text:p text:style-name="P2"/>
      <text:p text:style-name="P2">Сущности физически реализуются в двух таблицах (используются всеми сущностями) и таблицами расширения полей (у каждой сущности своя, именуется EXT_alias — alias задается в мета-таблице описания сущностей)</text:p>
      <text:p text:style-name="P2">Также используется таблица, указывающая в какой балансовой единице видна сущность. <text:span text:style-name="T2">Для сущностей, имеющих экземпляры видимые в разных БЕ, видимость экземпляров также хранится в некоей таблице, указывающей по id экземпляра сущности его видимость в разных БЕ</text:span></text:p>
      <text:p text:style-name="P4"/>
      <text:p text:style-name="P8" loext:marker-style-name="T1"><text:span text:style-name="T1">🔍 </text:span></text:p>
      <text:list text:style-name="WWNum3">
        <text:list-item>
          <text:p text:style-name="P9" loext:marker-style-name="T1"><text:span text:style-name="Strong_20_Emphasis"><text:span text:style-name="T1">Полиморфизм</text:span></text:span><text:span text:style-name="T1">: Одна и та же сущность (например, «Персоны») может быть вложена в разные документы. В «Накладной» она может быть в роли «Грузчики», а в «Приказе» — в роли «Сотрудники».</text:span></text:p>
        </text:list-item>
        <text:list-item>
          <text:p text:style-name="P9" loext:marker-style-name="T1"><text:span text:style-name="Strong_20_Emphasis"><text:span text:style-name="T1">Генерация кода</text:span></text:span><text:span text:style-name="T1">: Когда ты в IDE добавляешь строку в эту таблицу, Слон:</text:span></text:p>
          <text:list>
            <text:list-item>
              <text:p text:style-name="P11" loext:marker-style-name="T1"><text:span text:style-name="T1">Проверяет, есть ли в таблице </text:span><text:span text:style-name="Source_20_Text">ext_child</text:span><text:span text:style-name="T1"> колонка </text:span><text:span text:style-name="Source_20_Text">c_link_fieldname</text:span><text:span text:style-name="T1">.</text:span></text:p>
            </text:list-item>
            <text:list-item>
              <text:p text:style-name="P11" loext:marker-style-name="T1"><text:span text:style-name="T1">Если нет — делает </text:span><text:span text:style-name="Source_20_Text">ALTER TABLE ... ADD COLUMN ... integer</text:span><text:span text:style-name="T1">.</text:span></text:p>
            </text:list-item>
            <text:list-item>
              <text:p text:style-name="P11" loext:marker-style-name="T1"><text:span text:style-name="T1">Регистрирует это поле в </text:span><text:span text:style-name="Source_20_Text">meta.fields</text:span><text:span text:style-name="T1">, чтобы ты видел его в общем списке.</text:span></text:p>
            </text:list-item>
          </text:list>
        </text:list-item>
        <text:list-item>
          <text:p text:style-name="P10" loext:marker-style-name="T1"><text:span text:style-name="Strong_20_Emphasis"><text:span text:style-name="T1">Рантайм</text:span></text:span><text:span text:style-name="T1">: Когда Layer 3 открывает «Накладную» с </text:span><text:span text:style-name="Source_20_Text">id=500</text:span><text:span text:style-name="T1">, он смотрит в эту таблицу, видит связь с «Товарами» через поле </text:span><text:span text:style-name="Source_20_Text">invoiceid</text:span><text:span text:style-name="T1"> и делает запрос:<text:line-break/></text:span><text:span text:style-name="Source_20_Text">SELECT * FROM ext.ext_items WHERE invoiceid = 500</text:span><text:span text:style-name="T1">.</text:span></text:p>
        </text:list-item>
      </text:list>
      <text:p text:style-name="P12" loext:marker-style-name="T1"/>
      <text:p text:style-name="P12" loext:marker-style-name="T1"/>
      <text:p text:style-name="P2">Объекты системы (в режиме работы)- не являющиеся сущностями</text:p>
      <text:p text:style-name="P2">1) Проводки. Имеют две стороны. Привязываются к счетам и их ипостасям</text:p>
      <text:p text:style-name="P2"/>
      <text:p text:style-name="P2">2)регистры <text:s/>- обеспечивают хранение на определенную дату значений по дебет/кредиту у разных ипостасей счетов</text:p>
      <text:p text:style-name="P2"/>
      <text:p text:style-name="P2">3) связи. Элементы разных сущностей могут быть связаны между собой в рамках какой либо связи. При этом в рамках этой связи и элементов свои роли</text:p>
      <text:p text:style-name="P2">Например Связь — Родственные связи. Состоят из экземпляров справочника Персоны, с ролями из справочника — Семейные роли, экземпляров справочника Питомцы <text:s/>ролями из справочника — Функции питомцев</text:p>
      <text:p text:style-name="P2">Экземпляр — родственные связи семьи Ивановых. <text:s/>Входят Иванов — отец, муж</text:p>
      <text:p text:style-name="P2">Иванова -жена, мать, <text:s/>Иванов — сын, Барбос- собака -поводырь</text:p>
      <text:p text:style-name="P2"/>
      <text:p text:style-name="P2"/>
      <text:p text:style-name="P2"><text:span text:style-name="Strong_20_Emphasis">Групповые (Коллективные) связи</text:span> — это «социальная сеть» наших сущностей. Именно здесь мы описываем, как «Иванов», «Петров» и «Лабрадор Рекс» объединяются в одну «Семью Ивановых».</text:p>
      <text:p text:style-name="P2">Вот детальное описание структуры таблиц для твоей документации: от конфигурации правил (Meta) до физических участников (Data).</text:p>
      <text:p text:style-name="P1" loext:marker-style-name="T1"/>
      <text:p text:style-name="P7" loext:marker-style-name="T1"><text:soft-page-break/><text:span text:style-name="T1"/></text:p>
      <text:p text:style-name="P2"/>
      <text:p text:style-name="P2">Балансовые единицы — это орг единицы имеющие свой законченный контур в ерп</text:p>
      <text:p text:style-name="P2"/>
      <text:p text:style-name="P2"/>
      <text:p text:style-name="P2"/>
      <text:p text:style-name="P2"/>
      <text:p text:style-name="P2"/>
      <text:p text:style-name="P2">Структура данных</text:p>
      <text:p text:style-name="P2"><text:s/>данные хранятся в следующих схемах </text:p>
      <text:p text:style-name="P2">auth — авторизационные данные, данные о ролях..</text:p>
      <text:p text:style-name="P2">data — собственно данные erp</text:p>
      <text:p text:style-name="P2">ext — таблицы расширения для сущностей</text:p>
      <text:p text:style-name="P2">meta — конфигуратор таблиц</text:p>
      <text:p text:style-name="P2"/>
      <text:p text:style-name="P2">собственно <text:span text:style-name="T2">подробная </text:span>структура данных прилагается далее в файлах</text:p>
      <text:p text:style-name="P2"/>
      <text:p text:style-name="P5">Приведем здесь только названия таблиц и их значение в рамках настоящего описания</text:p>
      <text:p text:style-name="P5"/>
      <text:p text:style-name="P5">схема meta</text:p>
      <text:p text:style-name="P5"/>
      <text:p text:style-name="P5">entitytypes — список сущностей</text:p>
      <text:p text:style-name="P5">fields <text:s/>- поля расширения сущностей</text:p>
      <text:p text:style-name="P5">calculations — расчеты (если будем хранить не как сущности, на всякий случай пока)</text:p>
      <text:p text:style-name="P5">composition_roles — <text:span text:style-name="T3">справочник ролей подчиненной таблицы</text:span></text:p>
      <text:p text:style-name="P3"><text:span text:style-name="T2">entity_composition — </text:span><text:span text:style-name="T3">таблица конфигурирования подчиненных таблиц с указанием связующего поля</text:span></text:p>
      <text:p text:style-name="P3">entity_ref_rules-Правила: какие сущности и с какими ролями могут участвовать в типе связи</text:p>
      <text:p text:style-name="P3">entity_ref_types — <text:span text:style-name="T3">справочник типов связей (нпример родственные, члены футб клуба, члены профсоюза…)</text:span></text:p>
      <text:p text:style-name="P3"/>
      <text:p text:style-name="P3">field_types — <text:span text:style-name="T3">справочник типов полей.</text:span></text:p>
      <text:p text:style-name="P3">"C"<text:tab/>"Строка"<text:tab/>"Текстовые данные фиксированной макс. длины"</text:p>
      <text:p text:style-name="P3">"N"<text:tab/>"Число"<text:tab/>"Дробные числа (сумма, количество, вес)"</text:p>
      <text:p text:style-name="P3">"I"<text:tab/>"Целое"<text:tab/>"Целочисленные значения (счетчики, ID)"</text:p>
      <text:p text:style-name="P3">"D"<text:tab/>"Дата"<text:tab/>"Календарная дата"</text:p>
      <text:p text:style-name="P3">"T"<text:tab/>"Дата/Время"<text:tab/>"Точное время события"</text:p>
      <text:p text:style-name="P3">"L"<text:tab/>"Логика"<text:tab/>"Да/Нет (Checkbox)"</text:p>
      <text:p text:style-name="P3">"M"<text:tab/>"Текст (Memo)"<text:tab/>"Длинные описания, неограниченный текст"</text:p>
      <text:p text:style-name="P3">"R"<text:tab/>"Ссылка"<text:tab/>"Связь с другим справочником (Foreign Key)"</text:p>
      <text:p text:style-name="P3">"G"<text:tab/>"Картинка"<text:tab/>"Изображение (Blob + Name)"</text:p>
      <text:p text:style-name="P3">"V"<text:tab/>"Видео"<text:tab/>"Видеофайл (Blob + Name)"</text:p>
      <text:p text:style-name="P3">"F"<text:tab/>"Файл"<text:tab/>"Произвольный документ (Blob + Name)"</text:p>
      <text:p text:style-name="P3">"J"<text:tab/>"JSONB"<text:tab/>"Данные в формате JSON (бинарный)"</text:p>
      <text:p text:style-name="P3">"A"<text:tab/>"Массив"<text:tab/>"Массив значений (одномерный)"</text:p>
      <text:p text:style-name="P3"/>
      <text:p text:style-name="P3">form_elements — <text:span text:style-name="T3">содержимое форм (как класса)</text:span></text:p>
      <text:p text:style-name="P3">forms — <text:span text:style-name="T3">справочник форм с указанием сущности, якорной для формы</text:span></text:p>
      <text:p text:style-name="P3">menu — <text:span text:style-name="T3">справочник всех возможных меню в системе, зависит от роли в группе «Интерфейсные ролли», в которую входит <text:s/>пользователь. Пользователь входит ровно в одну роль группы «Интерфейсные роли»</text:span></text:p>
      <text:p text:style-name="P3">sys_params - Реестр глобальных переменных сессии (g-переменные)</text:p>
      <text:p text:style-name="P3"><text:soft-page-break/></text:p>
      <text:p text:style-name="P6">схема data</text:p>
      <text:p text:style-name="P6">entity_instances — экземпляры сущностей</text:p>
      <text:p text:style-name="P6">entity_linkage_items - Физический состав связи: Сущность + Роль + Период</text:p>
      <text:p text:style-name="P6">entity_linkages — экземпляр связи (который потом наполняется за счет entity_linkage_items )</text:p>
      <text:p text:style-name="P6">entity_versions — версии сущности</text:p>
      <text:p text:style-name="P6">entity_visibility - Матрица видимости объектов: какой экземпляр в каких БЕ доступен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9:32:00</meta:creation-date>
    <dc:date>2026-03-01T12:52:21.921745883</dc:date>
    <meta:editing-duration>PT9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78" meta:word-count="1003" meta:character-count="7660" meta:non-whitespace-character-count="6683"/>
  </office:meta>
</office:document-meta>
</file>